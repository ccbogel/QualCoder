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77958" officeooo:paragraph-rsid="00177958"/>
    </style:style>
    <style:style style:name="P2" style:family="paragraph" style:parent-style-name="Standard">
      <style:text-properties officeooo:paragraph-rsid="00177958"/>
    </style:style>
    <style:style style:name="T1" style:family="text">
      <style:text-properties officeooo:rsid="0018de08"/>
    </style:style>
    <style:style style:name="T2" style:family="text">
      <style:text-properties officeooo:rsid="00188a0b"/>
    </style:style>
    <style:style style:name="T3" style:family="text">
      <style:text-properties officeooo:rsid="001978ae"/>
    </style:style>
    <style:style style:name="T4" style:family="text">
      <style:text-properties officeooo:rsid="00177958"/>
    </style:style>
    <style:style style:name="T5" style:family="text">
      <style:text-properties fo:font-family="'Times New Roman'" style:font-family-generic="roman" officeooo:rsid="00177958" style:font-family-asian="'Times New Roman'" style:font-family-generic-asian="roman" style:font-family-complex="'Times New Roman'" style:font-family-generic-complex="roman"/>
    </style:style>
    <style:style style:name="T6" style:family="text">
      <style:text-properties style:font-name="Times New Roman" officeooo:rsid="00177958" style:font-name-asian="DejaVu Sans" style:font-name-complex="Lohit Hindi1"/>
    </style:style>
    <style:style style:name="T7" style:family="text">
      <style:text-properties style:font-name="Times New Roman" officeooo:rsid="00188a0b" style:font-name-asian="DejaVu Sans" style:font-name-complex="Lohit Hindi1"/>
    </style:style>
    <style:style style:name="T8" style:family="text">
      <style:text-properties style:font-name="Times New Roman" officeooo:rsid="0018de08" style:font-name-asian="DejaVu Sans" style:font-name-complex="Lohit Hind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 have</text:span><text:span text:style-name="T2"> not studied much before, </text:span><text:span text:style-name="T3">but my father Joe Bloggs really encouraged me to study again. </text:span><text:span text:style-name="T1">I</text:span> know that <text:span text:style-name="T1">I</text:span> must get help as <text:span text:style-name="T1">I have</text:span> struggled understanding the lecture slides <text:span text:style-name="T1">so far</text:span> and searching the web did not help. </text:p>
      <text:p text:style-name="P1"><text:span text:style-name="T1">I</text:span> really want someone to <text:span text:style-name="T1">sit down with me and </text:span>explain the <text:span text:style-name="T2">course </text:span>material.</text:p>
      <text:p text:style-name="P2"><text:span text:style-name="T4">The course cost </text:span><text:span text:style-name="T5">€</text:span><text:span text:style-name="T6">200.00 </text:span><text:span text:style-name="T7">and </text:span><text:span text:style-name="T8">I do</text:span><text:span text:style-name="T7"> not want to waste </text:span><text:span text:style-name="T8">my</text:span><text:span text:style-name="T7"> money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olin-2 </meta:initial-creator>
    <meta:creation-date>2013-10-19T10:12:50</meta:creation-date>
    <dc:date>2026-06-13T18:01:00.189840800</dc:date>
    <meta:editing-duration>PT1M27S</meta:editing-duration>
    <meta:editing-cycles>4</meta:editing-cycles>
    <meta:generator>LibreOffice/26.2.3.2$Windows_X86_64 LibreOffice_project/70e089b17412e4cb7773e41413306b17a2328c34</meta:generator>
    <meta:document-statistic meta:table-count="0" meta:image-count="0" meta:object-count="0" meta:page-count="1" meta:paragraph-count="3" meta:word-count="68" meta:character-count="352" meta:non-whitespace-character-count="286"/>
  </office:meta>
</office:document-meta>
</file>